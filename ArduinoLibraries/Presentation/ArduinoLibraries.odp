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F10000051C59F68DF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draw:textarea-vertical-align="middle"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outline1">
      <style:graphic-properties fo:min-height="9.13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  <style:text-properties fo:hyphenate="false" loext:hyphenation-no-caps="false" loext:hyphenation-no-last-word="fals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 fo:hyphenate="false" loext:hyphenation-no-caps="false" loext:hyphenation-no-last-word="false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0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rduino Libraries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Presentation to T-Exchange</text:p>
            <text:p>August 2026</text:p>
            <text:p/>
            <text:p>Norman Dunbar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Introduction – What’s Coming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What are libraries?</text:p>
              </text:list-item>
              <text:list-item>
                <text:p>How to develop a library for LM75 sensors</text:p>
              </text:list-item>
              <text:list-item>
                <text:p>Brief details of the LM75 temperature sensors</text:p>
              </text:list-item>
              <text:list-item>
                <text:p>Writing the Library</text:p>
              </text:list-item>
              <text:list-item>
                <text:p>Installing the library</text:p>
              </text:list-item>
              <text:list-item>
                <text:p>Using the library in sketch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What Are Libraries?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A library is something you write to prevent you having to write the same code again and again in multiple sketches</text:p>
              </text:list-item>
              <text:list-item>
                <text:p>Write it once in a library</text:p>
              </text:list-item>
              <text:list-item>
                <text:p>Use it multiple times in different sketches</text:p>
              </text:list-item>
              <text:list-item>
                <text:p>Sell it or give it away – if it’s really usefu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Developing Libraries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File system structure</text:p>
              </text:list-item>
              <text:list-item>
                <text:p>Boilerplate files – three of</text:p>
              </text:list-item>
              <text:list-item>
                <text:p>Header files</text:p>
              </text:list-item>
              <text:list-item>
                <text:p>Source files</text:p>
              </text:list-item>
              <text:list-item>
                <text:p>Beware of the C++ header file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File System Structure</text:p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2">
              <text:list-item>
                <text:p><text:span text:style-name="T1">Top level - LM75_AB</text:span></text:p>
              </text:list-item>
              <text:list-item>
                <text:p><text:span text:style-name="T1">Subdirectories </text:span></text:p>
                <text:list>
                  <text:list-item>
                    <text:p><text:span text:style-name="T2">examples – contains example sketches</text:span></text:p>
                  </text:list-item>
                  <text:list-item>
                    <text:p><text:span text:style-name="T2">src – contains library source files</text:span></text:p>
                  </text:list-item>
                </text:list>
              </text:list-item>
              <text:list-item>
                <text:p><text:span text:style-name="T1">Boilerplate files</text:span></text:p>
                <text:list>
                  <text:list-item>
                    <text:p><text:span text:style-name="T2">keywords.txt</text:span></text:p>
                  </text:list-item>
                  <text:list-item>
                    <text:p><text:span text:style-name="T2">library.properties</text:span></text:p>
                  </text:list-item>
                  <text:list-item>
                    <text:p><text:span text:style-name="T2">LICENS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oilerplate Files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The Licence file – LICENSE</text:p>
              </text:list-item>
              <text:list-item>
                <text:p>The Properties file – library.properties</text:p>
              </text:list-item>
              <text:list-item>
                <text:p>The Keywords file – keywords.txt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Header File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Usually named something.h</text:p>
              </text:list-item>
              <text:list-item>
                <text:p>May be more than one</text:p>
              </text:list-item>
              <text:list-item>
                <text:p>Defines constants used by the library</text:p>
              </text:list-item>
              <text:list-item>
                <text:p>Forward declares any functions exported by the library</text:p>
              </text:list-item>
              <text:list-item>
                <text:p>Used by the library and by sketch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ource File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The C, C++ or Assembly Language code for the library</text:p>
              </text:list-item>
              <text:list-item>
                <text:p>May be more than one source file</text:p>
              </text:list-item>
              <text:list-item>
                <text:p>Used to create the library</text:p>
              </text:list-item>
              <text:list-item>
                <text:p>Recompiled and linked for every sketch using the library</text:p>
              </text:list-item>
              <text:list-item>
                <text:p>Should really be written in Assembly or C, not C++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eware of C++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Wire.h, for example, is written in C++</text:p>
              </text:list-item>
              <text:list-item>
                <text:p>Your library file is named something.c – it’s a C file</text:p>
              </text:list-item>
              <text:list-item>
                <text:p>Compilation errors abound and they are pretty meaningless – usually relating to the Printable.h header</text:p>
              </text:list-item>
              <text:list-item>
                <text:p>Problem – C compiler doesn’t know C++</text:p>
              </text:list-item>
              <text:list-item>
                <text:p>Solution – rename your source files to something.cpp</text:p>
              </text:list-item>
              <text:list-item>
                <text:p>C++ can use C files. C cannot use C++ fi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LM75A/LM75B Temperature Sensor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Reasonably accurate temperature sensor</text:p>
              </text:list-item>
              <text:list-item>
                <text:p>Communicates over I2C/TWI/Wire protocol</text:p>
              </text:list-item>
              <text:list-item>
                <text:p>Temperature range from -55 to +125 Celcius</text:p>
              </text:list-item>
              <text:list-item>
                <text:p>Accurate +/-2C (-25 to +100) or +/-3C (-55 to +125)</text:p>
              </text:list-item>
              <text:list-item>
                <text:p>Clock speeds from 20 to 400 Hz</text:p>
              </text:list-item>
              <text:list-item>
                <text:p>Up to eight devices allowed on the bus </text:p>
              </text:list-item>
              <text:list-item>
                <text:p>Alarm enabled to handle over temperature situ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Writing the LM75_AB Library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 text:style-name="P3">Switching to Arduino IDE for this bit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Installing the LM75_AB Library<text:line-break/>as Source File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Close the Arduino IDE</text:p>
              </text:list-item>
              <text:list-item>
                <text:p>Copy the LM75_AB directory</text:p>
              </text:list-item>
              <text:list-item>
                <text:p>Paste into Arduino/libraries</text:p>
              </text:list-item>
              <text:list-item>
                <text:p>Open the IDE aga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Installing the LM75_AB Library<text:line-break/>as a Zip File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Compress the LM75_AB directory to a Zip file</text:p>
              </text:list-item>
              <text:list-item>
                <text:p>Open the Arduino IDE if not already open</text:p>
              </text:list-item>
              <text:list-item>
                <text:p>Click Sketch→Include Library→Add .Zip Library</text:p>
              </text:list-item>
              <text:list-item>
                <text:p>Navigate to the LM75_AB.zip file location</text:p>
              </text:list-item>
              <text:list-item>
                <text:p>Double-click the LM75_AB.zip file</text:p>
              </text:list-item>
              <text:list-item>
                <text:p>On completion the library can be used straight away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Using the Library in Sketches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Testing the library with any examples provided</text:p>
                <text:list>
                  <text:list-item>
                    <text:p>File→Examples→LM75_AB→Temperature</text:p>
                  </text:list-item>
                </text:list>
              </text:list-item>
              <text:list-item>
                <text:p>Writing a sketch that uses the library</text:p>
                <text:list>
                  <text:list-item>
                    <text:p>Sketch→Include Library→LM75_AB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he Demonstration Circuit</text:p>
          </draw:text-box>
        </draw:frame>
        <draw:frame draw:style-name="gr2" draw:text-style-name="P4" draw:layer="layout" svg:width="12.06cm" svg:height="10.372cm" svg:x="9cm" svg:y="3.128cm" presentation:class="graphic" presentation:user-transformed="true">
          <draw:image xlink:href="Pictures/10000001000005F10000051C59F68DF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Questions and Maybe Answers!</text:p>
          </draw:text-box>
        </draw:frame>
        <draw:frame presentation:style-name="pr4" draw:text-style-name="P6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 text:style-name="P5"><text:span text:style-name="T3">Any questions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hank you for Listening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You can wake up at the back now, I’m done!</text:p>
              </text:list-item>
              <text:list-item>
                <text:p>Everything from tonight is available on GitHub</text:p>
              </text:list-item>
              <text:list-item>
                <text:p><text:a xlink:href="https://github.com/NormanDunbar/T-Exchange" xlink:type="simple">https://github.com/NormanDunbar/T-Exchange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Mono" fo:font-family="'Liberation Mono'" style:font-style-name="Regular" style:font-family-generic="modern" style:font-pitch="fixed" fo:font-size="1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solid" svg:stroke-width="0.1cm" svg:stroke-color="#3399ff" draw:marker-start-width="0.35cm" draw:marker-end-width="0.35cm" svg:stroke-opacity="70%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align="start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solid" svg:stroke-width="0.1cm" svg:stroke-color="#3399ff" draw:marker-start-width="0.35cm" draw:marker-end-width="0.35cm" svg:stroke-opacity="55%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1T12:07:34.912881704</meta:creation-date>
    <meta:editing-duration>PT1H51M16S</meta:editing-duration>
    <meta:editing-cycles>52</meta:editing-cycles>
    <meta:generator>LibreOffice/24.2.7.2$Linux_X86_64 LibreOffice_project/420$Build-2</meta:generator>
    <dc:title>DNA</dc:title>
    <meta:initial-creator>Norman Dunbar</meta:initial-creator>
    <dc:date>2026-06-21T14:09:33.046978019</dc:date>
    <dc:creator>Norman Dunbar</dc:creator>
    <meta:print-date>2026-06-21T13:56:02.801459949</meta:print-date>
    <meta:printed-by>PDF files: Norman Dunbar</meta:printed-by>
    <meta:document-statistic meta:object-count="170"/>
  </office:meta>
</office:document-meta>
</file>